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1.802cm" table:align="left"/>
    </style:style>
    <style:style style:name="Tableau1.A" style:family="table-column">
      <style:table-column-properties style:column-width="3.341cm"/>
    </style:style>
    <style:style style:name="Tableau1.B" style:family="table-column">
      <style:table-column-properties style:column-width="8.461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able_20_Contents">
      <style:text-properties fo:font-weight="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3">
      <style:text-properties fo:font-weight="bold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T1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chat-history">
        <text:section text:style-name="Sect1" text:name="a6c754281a8e054f">
          <text:h text:style-name="Heading_20_2" text:outline-level="2">Gemini a dit</text:h>
          <text:section text:style-name="Sect2" text:name="model-response-message-contentr_a6c754281a8e054f">
            <text:p text:style-name="Text_20_body">C'est un excellent choix d'architecture. Passer d'une architecture monolithique à des microservices nécessite une rigueur particulière, surtout pour garantir la cohérence des données via une communication asynchrone.</text:p>
            <text:p text:style-name="Text_20_body">Voici une proposition de structure professionnelle pour votre projet, baptisé <text:span text:style-name="T1">"E-Com Microservices Architecture"</text:span>.</text:p>
            <text:p text:style-name="Horizontal_20_Line"/>
            <text:h text:style-name="Heading_20_2" text:outline-level="2">1. Architecture du Système</text:h>
            <text:p text:style-name="Text_20_body">L'architecture repose sur des microservices isolés, chacun possédant sa propre base de données pour garantir l'indépendance (principe de "Database per Service").</text:p>
            <text:h text:style-name="Heading_20_3" text:outline-level="3">Services d'Infrastructure</text:h>
            <text:list xml:id="list2202428791" text:style-name="L1">
              <text:list-item>
                <text:p text:style-name="P3"><text:span text:style-name="T1">Config-Service :</text:span> Serveur centralisé (Spring Cloud Config) qui stocke les fichiers <text:span text:style-name="Source_20_Text">.yml</text:span> ou <text:span text:style-name="Source_20_Text">.properties</text:span> des autres services.</text:p>
              </text:list-item>
              <text:list-item>
                <text:p text:style-name="P3"><text:span text:style-name="T1">Eureka-Service :</text:span> Annuaire (Service Discovery) où chaque microservice s'enregistre pour être localisé dynamiquement.</text:p>
              </text:list-item>
              <text:list-item>
                <text:p text:style-name="P3"><text:span text:style-name="T1">Gateway-Service :</text:span> Point d'entrée unique. Il gère le routage, la sécurité globale (CORS, Rate Limiting) et la terminaison des jetons JWT.</text:p>
              </text:list-item>
            </text:list>
            <text:h text:style-name="Heading_20_3" text:outline-level="3">Services Métiers</text:h>
            <text:list xml:id="list200486226" text:style-name="L2">
              <text:list-item>
                <text:p text:style-name="P4"><text:span text:style-name="T1">Client-Service :</text:span> Gestion des profils clients, authentification et portefeuilles.</text:p>
              </text:list-item>
              <text:list-item>
                <text:p text:style-name="P4"><text:span text:style-name="T1">Produit-Service :</text:span> Catalogue des articles (nom, description, prix, catégorie).</text:p>
              </text:list-item>
              <text:list-item>
                <text:p text:style-name="P4"><text:span text:style-name="T1">Stock-Service :</text:span> Gestion des quantités disponibles et des entrepôts.</text:p>
              </text:list-item>
            </text:list>
            <text:p text:style-name="Horizontal_20_Line"/>
            <text:h text:style-name="Heading_20_2" text:outline-level="2">2. Logique de Communication (Workflow)</text:h>
            <text:p text:style-name="Text_20_body">Pour éviter un couplage fort, nous utilisons <text:span text:style-name="T1">Apache Kafka</text:span> pour orchestrer les événements de commande.</text:p>
            <text:h text:style-name="Heading_20_3" text:outline-level="3">Scénario : Passage d'une commande</text:h>
            <text:list xml:id="list1754780601" text:style-name="L3">
              <text:list-item>
                <text:p text:style-name="P5"><text:span text:style-name="T1">Requête :</text:span> Le Client envoie une requête <text:span text:style-name="Source_20_Text">POST /orders</text:span> via la <text:span text:style-name="T1">Gateway</text:span> vers le <text:span text:style-name="T1">Client-Service</text:span>.</text:p>
              </text:list-item>
              <text:list-item>
                <text:p text:style-name="P5"><text:span text:style-name="T1">Validation Initiale :</text:span> Le Client-Service valide l'identité et le solde du client.</text:p>
              </text:list-item>
              <text:list-item>
                <text:p text:style-name="P5"><text:span text:style-name="T1">Événement Kafka (OrderCreated) :</text:span> Le Client-Service publie un message dans le topic <text:span text:style-name="Source_20_Text">order-topic</text:span>.</text:p>
              </text:list-item>
              <text:list-item>
                <text:p text:style-name="P6">Vérification Produit &amp; Stock :</text:p>
                <text:list>
                  <text:list-item>
                    <text:p text:style-name="P5"><text:soft-page-break/><text:span text:style-name="T1">Produit-Service</text:span> écoute le topic, vérifie l'existence du produit et répond via un topic <text:span text:style-name="Source_20_Text">product-verified</text:span>.</text:p>
                  </text:list-item>
                  <text:list-item>
                    <text:p text:style-name="P5"><text:span text:style-name="T1">Stock-Service</text:span> écoute le topic, vérifie la disponibilité (quantité &gt; 0) et réserve le stock.</text:p>
                  </text:list-item>
                </text:list>
              </text:list-item>
              <text:list-item>
                <text:p text:style-name="P5"><text:span text:style-name="T1">Finalisation :</text:span> Le Client-Service agrège les réponses. Si tout est OK, la commande passe au statut <text:span text:style-name="Source_20_Text">CONFIRMED</text:span>. Sinon, un processus de compensation (Saga Pattern) est déclenché pour annuler les actions précédentes.</text:p>
              </text:list-item>
            </text:list>
            <text:p text:style-name="Horizontal_20_Line"/>
            <text:h text:style-name="Heading_20_2" text:outline-level="2">3. Structure du Projet (Multi-Module Maven/Gradle)</text:h>
            <text:p text:style-name="Text_20_body">Plaintext</text:p>
            <text:p text:style-name="Preformatted_20_Text"><text:span text:style-name="Source_20_Text">e-com-microservices/</text:span></text:p>
            <text:p text:style-name="Preformatted_20_Text"><text:span text:style-name="Source_20_Text">├── config-service/ <text:s text:c="9"/># Port: 8888</text:span></text:p>
            <text:p text:style-name="Preformatted_20_Text"><text:span text:style-name="Source_20_Text">├── eureka-service/ <text:s text:c="9"/># Port: 8761</text:span></text:p>
            <text:p text:style-name="Preformatted_20_Text"><text:span text:style-name="Source_20_Text">├── gateway-service/ <text:s text:c="8"/># Port: 8222 (Spring Cloud Gateway + Spring Security JWT)</text:span></text:p>
            <text:p text:style-name="Preformatted_20_Text"><text:span text:style-name="Source_20_Text">├── client-service/ <text:s text:c="9"/># Port: 8081 (Kafka Producer/Consumer + PostgreSQL)</text:span></text:p>
            <text:p text:style-name="Preformatted_20_Text"><text:span text:style-name="Source_20_Text">├── produit-service/ <text:s text:c="8"/># Port: 8082 (Kafka Consumer + MongoDB/PostgreSQL)</text:span></text:p>
            <text:p text:style-name="Preformatted_20_Text"><text:span text:style-name="Source_20_Text">├── stock-service/ <text:s text:c="10"/># Port: 8083 (Kafka Consumer + PostgreSQL)</text:span></text:p>
            <text:p text:style-name="Preformatted_20_Text"><text:span text:style-name="Source_20_Text">├── docker-compose.yml <text:s text:c="6"/># Orchestration (Services + Kafka + Zookeeper + DBs)</text:span></text:p>
            <text:p text:style-name="P1"><text:span text:style-name="Source_20_Text">└── prometheus-grafana/ <text:s text:c="5"/># Optionnel: Monitoring</text:span></text:p>
            <text:p text:style-name="Horizontal_20_Line"/>
            <text:h text:style-name="Heading_20_2" text:outline-level="2">4. Stack Technique Préconisée</text:h>
            <table:table table:name="Tableau1" table:style-name="Tableau1">
              <table:table-column table:style-name="Tableau1.A"/>
              <table:table-column table:style-name="Tableau1.B"/>
              <table:table-header-rows>
                <table:table-row>
                  <table:table-cell table:style-name="Tableau1.A1" office:value-type="string">
                    <text:p text:style-name="Table_20_Heading">Composant</text:p>
                  </table:table-cell>
                  <table:table-cell table:style-name="Tableau1.A1" office:value-type="string">
                    <text:p text:style-name="Table_20_Heading">Technologie</text:p>
                  </table:table-cell>
                </table:table-row>
              </table:table-header-rows>
              <table:table-row>
                <table:table-cell table:style-name="Tableau1.A1" office:value-type="string">
                  <text:p text:style-name="P2">Framework</text:p>
                </table:table-cell>
                <table:table-cell table:style-name="Tableau1.A1" office:value-type="string">
                  <text:p text:style-name="Table_20_Contents">Spring Boot 3.x, Spring Cloud 2023.x</text:p>
                </table:table-cell>
              </table:table-row>
              <table:table-row>
                <table:table-cell table:style-name="Tableau1.A1" office:value-type="string">
                  <text:p text:style-name="P2">Sécurité</text:p>
                </table:table-cell>
                <table:table-cell table:style-name="Tableau1.A1" office:value-type="string">
                  <text:p text:style-name="Table_20_Contents">Spring Security (Stateless), JWT, OAuth2</text:p>
                </table:table-cell>
              </table:table-row>
              <table:table-row>
                <table:table-cell table:style-name="Tableau1.A1" office:value-type="string">
                  <text:p text:style-name="P2">Messaging</text:p>
                </table:table-cell>
                <table:table-cell table:style-name="Tableau1.A1" office:value-type="string">
                  <text:p text:style-name="Table_20_Contents">Apache Kafka</text:p>
                </table:table-cell>
              </table:table-row>
              <table:table-row>
                <table:table-cell table:style-name="Tableau1.A1" office:value-type="string">
                  <text:p text:style-name="P2">Conteneurisation</text:p>
                </table:table-cell>
                <table:table-cell table:style-name="Tableau1.A1" office:value-type="string">
                  <text:p text:style-name="Table_20_Contents">Docker &amp; Docker Compose</text:p>
                </table:table-cell>
              </table:table-row>
              <table:table-row>
                <table:table-cell table:style-name="Tableau1.A1" office:value-type="string">
                  <text:p text:style-name="P2">Base de données</text:p>
                </table:table-cell>
                <table:table-cell table:style-name="Tableau1.A1" office:value-type="string">
                  <text:p text:style-name="Table_20_Contents">PostgreSQL (Client/Stock), MongoDB (Produit)</text:p>
                </table:table-cell>
              </table:table-row>
              <table:table-row>
                <table:table-cell table:style-name="Tableau1.A1" office:value-type="string">
                  <text:p text:style-name="P2">Découverte</text:p>
                </table:table-cell>
                <table:table-cell table:style-name="Tableau1.A1" office:value-type="string">
                  <text:p text:style-name="Table_20_Contents">Spring Cloud Netflix Eureka</text:p>
                </table:table-cell>
              </table:table-row>
            </table:table>
            <text:p text:style-name="Horizontal_20_Line"/>
            <text:h text:style-name="Heading_20_2" text:outline-level="2">5. Documentation de l'Implémentation Sécurité &amp; Docker</text:h>
            <text:h text:style-name="Heading_20_3" text:outline-level="3">Sécurité (Spring Security + JWT)</text:h>
            <text:p text:style-name="Text_20_body">La sécurité est gérée au niveau de la <text:span text:style-name="T1">Gateway</text:span>. Elle intercepte les requêtes, valide le token JWT, puis transmet les informations utilisateur aux services internes via les headers HTTP.</text:p>
            <text:list xml:id="list441016330" text:style-name="L4">
              <text:list-item>
                <text:p text:style-name="P7">Les microservices internes (Produit, Stock) peuvent également avoir une configuration Spring Security pour n'accepter que les requêtes venant de l'IP de la Gateway.</text:p>
              </text:list-item>
            </text:list>
            <text:h text:style-name="Heading_20_3" text:outline-level="3">Configuration Docker Compose (Extrait)</text:h>
            <text:p text:style-name="Text_20_body">Votre fichier <text:span text:style-name="Source_20_Text">docker-compose.yml</text:span> doit inclure le cluster Kafka pour la communication asynchrone :</text:p>
            <text:p text:style-name="Text_20_body">YAML</text:p>
            <text:p text:style-name="Preformatted_20_Text"><text:span text:style-name="Source_20_Text">services:</text:span></text:p>
            <text:p text:style-name="Preformatted_20_Text"><text:span text:style-name="Source_20_Text"><text:s text:c="2"/>zookeeper:</text:span></text:p>
            <text:p text:style-name="Preformatted_20_Text"><text:span text:style-name="Source_20_Text"><text:s text:c="4"/>image: confluentinc/cp-zookeeper:latest</text:span></text:p>
            <text:p text:style-name="Preformatted_20_Text"><text:span text:style-name="Source_20_Text"><text:s text:c="4"/>environment:</text:span></text:p>
            <text:p text:style-name="Preformatted_20_Text"><text:soft-page-break/><text:span text:style-name="Source_20_Text"><text:s text:c="6"/>ZOOKEEPER_CLIENT_PORT: 2181</text:span></text:p>
            <text:p text:style-name="Preformatted_20_Text"/>
            <text:p text:style-name="Preformatted_20_Text"><text:span text:style-name="Source_20_Text"><text:s text:c="2"/>kafka:</text:span></text:p>
            <text:p text:style-name="Preformatted_20_Text"><text:span text:style-name="Source_20_Text"><text:s text:c="4"/>image: confluentinc/cp-kafka:latest</text:span></text:p>
            <text:p text:style-name="Preformatted_20_Text"><text:span text:style-name="Source_20_Text"><text:s text:c="4"/>depends_on:</text:span></text:p>
            <text:p text:style-name="Preformatted_20_Text"><text:span text:style-name="Source_20_Text"><text:s text:c="6"/>- zookeeper</text:span></text:p>
            <text:p text:style-name="Preformatted_20_Text"><text:span text:style-name="Source_20_Text"><text:s text:c="4"/>ports:</text:span></text:p>
            <text:p text:style-name="Preformatted_20_Text"><text:span text:style-name="Source_20_Text"><text:s text:c="6"/>- "9092:9092"</text:span></text:p>
            <text:p text:style-name="Preformatted_20_Text"><text:span text:style-name="Source_20_Text"><text:s text:c="4"/>environment:</text:span></text:p>
            <text:p text:style-name="Preformatted_20_Text"><text:span text:style-name="Source_20_Text"><text:s text:c="6"/>KAFKA_ZOOKEEPER_CONNECT: zookeeper:2181</text:span></text:p>
            <text:p text:style-name="Preformatted_20_Text"><text:span text:style-name="Source_20_Text"><text:s text:c="6"/>KAFKA_ADVERTISED_LISTENERS: PLAINTEXT://kafka:9092</text:span></text:p>
            <text:p text:style-name="Preformatted_20_Text"><text:span text:style-name="Source_20_Text"><text:s text:c="6"/>KAFKA_OFFSETS_TOPIC_REPLICATION_FACTOR: 1</text:span></text:p>
            <text:p text:style-name="Preformatted_20_Text"/>
            <text:p text:style-name="Preformatted_20_Text"><text:span text:style-name="Source_20_Text"><text:s text:c="2"/># Vos services Spring Boot ici</text:span></text:p>
            <text:p text:style-name="Preformatted_20_Text"><text:span text:style-name="Source_20_Text"><text:s text:c="2"/>client-service:</text:span></text:p>
            <text:p text:style-name="Preformatted_20_Text"><text:span text:style-name="Source_20_Text"><text:s text:c="4"/>build: ./client-service</text:span></text:p>
            <text:p text:style-name="Preformatted_20_Text"><text:span text:style-name="Source_20_Text"><text:s text:c="4"/>depends_on:</text:span></text:p>
            <text:p text:style-name="Preformatted_20_Text"><text:span text:style-name="Source_20_Text"><text:s text:c="6"/>- kafka</text:span></text:p>
            <text:p text:style-name="P1"><text:span text:style-name="Source_20_Text"><text:s text:c="6"/>- config-service</text:span></text:p>
            <text:p text:style-name="Horizontal_20_Line"/>
            <text:h text:style-name="Heading_20_2" text:outline-level="2">Prochaines Étapes</text:h>
            <text:list xml:id="list3914314201" text:style-name="L5">
              <text:list-item>
                <text:p text:style-name="P8"><text:span text:style-name="T1">Initialiser le Config-Service</text:span> : C'est la base pour que les autres services récupèrent leurs paramètres.</text:p>
              </text:list-item>
              <text:list-item>
                <text:p text:style-name="P8"><text:span text:style-name="T1">Configurer Eureka</text:span> : Pour permettre la communication entre services.</text:p>
              </text:list-item>
              <text:list-item>
                <text:p text:style-name="P8"><text:span text:style-name="T1">Définir les Schémas Avro ou JSON</text:span> : Pour les messages Kafka afin de garantir que les services se comprennent.</text:p>
              </text:list-item>
            </text:list>
          </text:section>
        </text:section>
      </text:section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1T21:02:12.806351230</meta:creation-date>
    <dc:date>2026-04-01T21:03:09.929597382</dc:date>
    <meta:editing-duration>PT1M1S</meta:editing-duration>
    <meta:editing-cycles>1</meta:editing-cycles>
    <meta:document-statistic meta:table-count="1" meta:image-count="0" meta:object-count="0" meta:page-count="3" meta:paragraph-count="81" meta:word-count="572" meta:character-count="4351" meta:non-whitespace-character-count="3725"/>
    <meta:generator>LibreOffice/7.3.7.2$Linux_X86_64 LibreOffice_project/30$Build-2</meta:generator>
  </office:meta>
</office:document-meta>
</file>